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middle" fo:background-color="#1F4E78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automatic"/>
    </style:style>
    <style:style style:name="ce6" style:family="table-cell" style:parent-style-name="Default" style:data-style-name="N0">
      <style:table-cell-properties fo:border="thin solid #CCCCCC" style:vertical-align="automatic"/>
    </style:style>
    <style:style style:name="ce7" style:family="table-cell" style:parent-style-name="Default" style:data-style-name="N4">
      <style:table-cell-properties fo:border="thin solid #CCCCCC" style:vertical-align="automatic"/>
    </style:style>
    <style:style style:name="ce8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CCCCCC" style:vertical-align="automatic"/>
      <style:text-properties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none" fo:border-left="thin solid #CCCCCC" fo:border-right="thin solid #CCCCCC" style:vertical-align="automatic"/>
    </style:style>
    <style:style style:name="ce11" style:family="table-cell" style:parent-style-name="Default" style:data-style-name="N4">
      <style:table-cell-properties fo:border-top="none" fo:border-bottom="none" fo:border-left="thin solid #CCCCCC" fo:border-right="thin solid #CCCCCC" style:vertical-align="automatic"/>
    </style:style>
    <style:style style:name="ce12" style:family="table-cell" style:parent-style-name="Default" style:data-style-name="N0">
      <style:table-cell-properties fo:border="thin solid #CCCCCC" style:vertical-align="automatic"/>
      <style:text-properties fo:font-weight="bold" style:font-weight-asian="bold" style:font-weight-complex="bold"/>
    </style:style>
    <style:style style:name="ce13" style:family="table-cell" style:parent-style-name="Excel_32_Built-in_32_Currency" style:data-style-name="N36">
      <style:table-cell-properties fo:border="thin solid #CCCCCC" style:vertical-align="middle" fo:background-color="#1F4E78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Excel_32_Built-in_32_Currency" style:data-style-name="N36">
      <style:table-cell-properties fo:border="thin solid #CCCCCC" style:vertical-align="automatic" fo:background-color="transparent"/>
      <style:text-properties fo:color="#000000"/>
    </style:style>
    <style:style style:name="ce15" style:family="table-cell" style:parent-style-name="Default" style:data-style-name="N4">
      <style:table-cell-properties fo:border="thin solid #CCCCCC" style:vertical-align="automatic"/>
      <style:text-properties style:text-underline-style="solid" style:text-underline-type="single"/>
    </style:style>
    <style:style style:name="ce16" style:family="table-cell" style:parent-style-name="Default" style:data-style-name="N30">
      <style:table-cell-properties fo:border="thin solid #CCCCCC" style:vertical-align="automatic"/>
      <style:text-properties style:text-underline-style="solid" style:text-underline-type="single"/>
    </style:style>
    <style:style style:name="ce17" style:family="table-cell" style:parent-style-name="Default" style:data-style-name="N30">
      <style:table-cell-properties fo:border="thin solid #CCCCCC" style:vertical-align="automatic"/>
    </style:style>
    <style:style style:name="ce18" style:family="table-cell" style:parent-style-name="Default" style:data-style-name="N30">
      <style:table-cell-properties fo:border-top="thin solid #CCCCCC" fo:border-bottom="none" fo:border-left="thin solid #CCCCCC" fo:border-right="thin solid #CCCCCC" style:vertical-align="automatic"/>
    </style:style>
    <style:style style:name="ce19" style:family="table-cell" style:parent-style-name="Excel_32_Built-in_32_Currency" style:data-style-name="N36">
      <style:table-cell-properties fo:border-top="thin solid #CCCCCC" fo:border-bottom="none" fo:border-left="thin solid #CCCCCC" fo:border-right="thin solid #CCCCCC" style:vertical-align="automatic" fo:background-color="transparent"/>
      <style:text-properties fo:color="#000000"/>
    </style:style>
    <style:style style:name="ce20" style:family="table-cell" style:parent-style-name="Default" style:data-style-name="N4">
      <style:table-cell-properties fo:border-top="thin solid #CCCCCC" fo:border-bottom="none" fo:border-left="thin solid #CCCCCC" fo:border-right="thin solid #CCCCCC" style:vertical-align="automatic"/>
    </style:style>
    <style:style style:name="ce21" style:family="table-cell" style:parent-style-name="Excel_32_Built-in_32_Currency" style:data-style-name="N36">
      <style:table-cell-properties style:vertical-align="automatic" fo:background-color="transparent"/>
      <style:text-properties fo:color="#000000"/>
    </style:style>
    <style:style style:name="ce2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4">
      <style:table-cell-properties style:vertical-align="automatic"/>
      <style:text-properties fo:color="#008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4">
      <style:table-cell-properties style:vertical-align="automatic"/>
      <style:text-properties fo:color="#FF0000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4">
      <style:table-cell-properties style:vertical-align="automatic"/>
      <style:text-properties fo:color="#1F4E78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4">
      <style:table-cell-properties fo:border-top="none" fo:border-bottom="none" fo:border-left="thin solid #CCCCCC" fo:border-right="thin solid #CCCCCC" style:vertical-align="automatic"/>
      <style:map style:condition="of:cell-content()&gt;0" style:apply-style-name="cf36"/>
      <style:map style:condition="of:cell-content()&lt;0" style:apply-style-name="cf34"/>
      <style:map style:condition="of:cell-content()=0" style:apply-style-name="cf35"/>
    </style:style>
    <style:style style:name="ce27" style:family="table-cell" style:parent-style-name="Default" style:data-style-name="N4">
      <style:table-cell-properties fo:border="thin solid #CCCCCC" style:vertical-align="automatic"/>
      <style:map style:condition="of:cell-content()&gt;0" style:apply-style-name="cf36"/>
      <style:map style:condition="of:cell-content()&lt;0" style:apply-style-name="cf34"/>
      <style:map style:condition="of:cell-content()=0" style:apply-style-name="cf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ctual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78" table:default-cell-style-name="ce3"/>
        <table:table-row table:style-name="ro1">
          <table:table-cell office:value-type="string" table:style-name="ce2">
            <text:p>Remesero</text:p>
          </table:table-cell>
          <table:table-cell office:value-type="string" table:style-name="ce2">
            <text:p>USD (±)</text:p>
          </table:table-cell>
          <table:table-cell office:value-type="string" table:style-name="ce2">
            <text:p>CUP</text:p>
          </table:table-cell>
          <table:table-cell office:value-type="string" table:style-name="ce2">
            <text:p>Tasa CUP/USD</text:p>
          </table:table-cell>
          <table:table-cell office:value-type="string" table:style-name="ce2">
            <text:p>USD Equiv.</text:p>
          </table:table-cell>
          <table:table-cell office:value-type="string" table:style-name="ce2">
            <text:p>Nota</text:p>
          </table:table-cell>
          <table:table-cell table:style-name="ce3"/>
          <table:table-cell office:value-type="string" table:style-name="ce4">
            <text:p>Tasa Global</text:p>
          </table:table-cell>
          <table:table-cell office:value-type="float" office:value="530" table:style-name="ce5">
            <text:p>530.0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Jose</text:p>
          </table:table-cell>
          <table:table-cell office:value-type="float" office:value="1900" table:style-name="ce27">
            <text:p>1,900.00</text:p>
          </table:table-cell>
          <table:table-cell office:value-type="float" office:value="12500000" table:style-name="ce27">
            <text:p>12,500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5484.905660377357" table:formula="of:=[.B2]+IF([.D2]=0;0;[.C2]/[.D2])" table:style-name="ce27">
            <text:p>25,484.91</text:p>
          </table:table-cell>
          <table:table-cell table:style-name="ce6"/>
          <table:table-cell table:number-columns-repeated="2" table:style-name="ce3"/>
          <table:table-cell office:value-type="string" table:style-name="ce3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drian</text:p>
          </table:table-cell>
          <table:table-cell office:value-type="float" office:value="0" table:style-name="ce27">
            <text:p>0.00</text:p>
          </table:table-cell>
          <table:table-cell office:value-type="float" office:value="500000" table:style-name="ce27">
            <text:p>500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943.39622641509436" table:formula="of:=[.B3]+IF([.D3]=0;0;[.C3]/[.D3])" table:style-name="ce27">
            <text:p>943.4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Micho zelle</text:p>
          </table:table-cell>
          <table:table-cell office:value-type="float" office:value="-880" table:style-name="ce27">
            <text:p>-880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-880" table:formula="of:=[.B4]+IF([.D4]=0;0;[.C4]/[.D4])" table:style-name="ce27">
            <text:p>-88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Micho wire</text:p>
          </table:table-cell>
          <table:table-cell office:value-type="float" office:value="0" table:style-name="ce27">
            <text:p>0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5]+IF([.D5]=0;0;[.C5]/[.D5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Elizabeth</text:p>
          </table:table-cell>
          <table:table-cell table:style-name="ce27"/>
          <table:table-cell office:value-type="float" office:value="-161530" table:style-name="ce27">
            <text:p>-161,53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304.77358490566036" table:formula="of:=[.B6]+IF([.D6]=0;0;[.C6]/[.D6])" table:style-name="ce27">
            <text:p>-304.77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Luisi Entregas</text:p>
          </table:table-cell>
          <table:table-cell office:value-type="float" office:value="0" table:style-name="ce27">
            <text:p>0.00</text:p>
          </table:table-cell>
          <table:table-cell office:value-type="float" office:value="2086980" table:style-name="ce27">
            <text:p>2,086,98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3937.6981132075471" table:formula="of:=[.B7]+IF([.D7]=0;0;[.C7]/[.D7])" table:style-name="ce27">
            <text:p>3,937.7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Luisi Remesas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8]+IF([.D8]=0;0;[.C8]/[.D8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Gea</text:p>
          </table:table-cell>
          <table:table-cell office:value-type="float" office:value="0" table:style-name="ce27">
            <text:p>0.00</text:p>
          </table:table-cell>
          <table:table-cell office:value-type="float" office:value="-530540" table:style-name="ce27">
            <text:p>-530,54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1001.0188679245283" table:formula="of:=[.B9]+IF([.D9]=0;0;[.C9]/[.D9])" table:style-name="ce27">
            <text:p>-1,001.02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Mama</text:p>
          </table:table-cell>
          <table:table-cell office:value-type="float" office:value="-935" table:style-name="ce27">
            <text:p>-935.00</text:p>
          </table:table-cell>
          <table:table-cell office:value-type="float" office:value="-80000" table:style-name="ce27">
            <text:p>-80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1085.9433962264152" table:formula="of:=[.B10]+IF([.D10]=0;0;[.C10]/[.D10])" table:style-name="ce27">
            <text:p>-1,085.94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Papa</text:p>
          </table:table-cell>
          <table:table-cell office:value-type="float" office:value="-10219" table:style-name="ce27">
            <text:p>-10,219.00</text:p>
          </table:table-cell>
          <table:table-cell office:value-type="float" office:value="200000" table:style-name="ce27">
            <text:p>200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9841.6415094339627" table:formula="of:=[.B11]+IF([.D11]=0;0;[.C11]/[.D11])" table:style-name="ce27">
            <text:p>-9,841.64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Francisco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12]+IF([.D12]=0;0;[.C12]/[.D12])" table:style-name="ce27">
            <text:p>0.00</text:p>
          </table:table-cell>
          <table:table-cell office:value-type="string" table:style-name="ce6">
            <text:p>puro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6">
            <text:p>Yosvani</text:p>
          </table:table-cell>
          <table:table-cell table:style-name="ce27"/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13]+IF([.D13]=0;0;[.C13]/[.D13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Arguilago</text:p>
          </table:table-cell>
          <table:table-cell office:value-type="float" office:value="0" table:style-name="ce27">
            <text:p>0.00</text:p>
          </table:table-cell>
          <table:table-cell office:value-type="float" office:value="2733300" table:style-name="ce27">
            <text:p>2,733,3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5157.1698113207549" table:formula="of:=[.B14]+IF([.D14]=0;0;[.C14]/[.D14])" table:style-name="ce27">
            <text:p>5,157.17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Victor</text:p>
          </table:table-cell>
          <table:table-cell office:value-type="float" office:value="0" table:style-name="ce27">
            <text:p>0.00</text:p>
          </table:table-cell>
          <table:table-cell office:value-type="float" office:value="-12679450" table:style-name="ce27">
            <text:p>-12,679,45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23923.490566037737" table:formula="of:=[.B15]+IF([.D15]=0;0;[.C15]/[.D15])" table:style-name="ce27">
            <text:p>-23,923.49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enmanuel</text:p>
          </table:table-cell>
          <table:table-cell table:style-name="ce27"/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16]+IF([.D16]=0;0;[.C16]/[.D16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Yonky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17]+IF([.D17]=0;0;[.C17]/[.D17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Dany hisoka yuma</text:p>
          </table:table-cell>
          <table:table-cell office:value-type="float" office:value="7000" table:style-name="ce27">
            <text:p>7,00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7000" table:formula="of:=[.B18]+IF([.D18]=0;0;[.C18]/[.D18])" table:style-name="ce27">
            <text:p>7,00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Hisoka</text:p>
          </table:table-cell>
          <table:table-cell office:value-type="float" office:value="382.5" table:style-name="ce27">
            <text:p>382.5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382.5" table:formula="of:=[.B19]+IF([.D19]=0;0;[.C19]/[.D19])" table:style-name="ce27">
            <text:p>382.5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Jessica</text:p>
          </table:table-cell>
          <table:table-cell office:value-type="float" office:value="0" table:style-name="ce27">
            <text:p>0.00</text:p>
          </table:table-cell>
          <table:table-cell office:value-type="float" office:value="9480" table:style-name="ce27">
            <text:p>9,48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17.886792452830189" table:formula="of:=[.B20]+IF([.D20]=0;0;[.C20]/[.D20])" table:style-name="ce27">
            <text:p>17.89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Alber</text:p>
          </table:table-cell>
          <table:table-cell office:value-type="float" office:value="0" table:style-name="ce27">
            <text:p>0.00</text:p>
          </table:table-cell>
          <table:table-cell office:value-type="float" office:value="31390" table:style-name="ce27">
            <text:p>31,39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59.226415094339622" table:formula="of:=[.B21]+IF([.D21]=0;0;[.C21]/[.D21])" table:style-name="ce27">
            <text:p>59.23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Odelio</text:p>
          </table:table-cell>
          <table:table-cell office:value-type="float" office:value="0" table:style-name="ce27">
            <text:p>0.00</text:p>
          </table:table-cell>
          <table:table-cell office:value-type="float" office:value="3600" table:style-name="ce27">
            <text:p>3,6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6.7924528301886795" table:formula="of:=[.B22]+IF([.D22]=0;0;[.C22]/[.D22])" table:style-name="ce27">
            <text:p>6.79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Edymir</text:p>
          </table:table-cell>
          <table:table-cell office:value-type="float" office:value="0" table:style-name="ce27">
            <text:p>0.00</text:p>
          </table:table-cell>
          <table:table-cell office:value-type="float" office:value="-129975" table:style-name="ce27">
            <text:p>-129,975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245.23584905660377" table:formula="of:=[.B23]+IF([.D23]=0;0;[.C23]/[.D23])" table:style-name="ce27">
            <text:p>-245.2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Dennys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24]+IF([.D24]=0;0;[.C24]/[.D24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Pupo</text:p>
          </table:table-cell>
          <table:table-cell office:value-type="float" office:value="0" table:style-name="ce27">
            <text:p>0.00</text:p>
          </table:table-cell>
          <table:table-cell office:value-type="float" office:value="-99500" table:style-name="ce27">
            <text:p>-99,5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187.73584905660377" table:formula="of:=[.B25]+IF([.D25]=0;0;[.C25]/[.D25])" table:style-name="ce27">
            <text:p>-187.7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Giorgue</text:p>
          </table:table-cell>
          <table:table-cell office:value-type="float" office:value="0" table:style-name="ce27">
            <text:p>0.00</text:p>
          </table:table-cell>
          <table:table-cell office:value-type="float" office:value="-390950" table:style-name="ce27">
            <text:p>-390,95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737.64150943396226" table:formula="of:=[.B26]+IF([.D26]=0;0;[.C26]/[.D26])" table:style-name="ce27">
            <text:p>-737.6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Jesus</text:p>
          </table:table-cell>
          <table:table-cell office:value-type="float" office:value="0" table:style-name="ce27">
            <text:p>0.00</text:p>
          </table:table-cell>
          <table:table-cell office:value-type="float" office:value="-1311300" table:style-name="ce27">
            <text:p>-1,311,3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2474.1509433962265" table:formula="of:=[.B27]+IF([.D27]=0;0;[.C27]/[.D27])" table:style-name="ce27">
            <text:p>-2,474.15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wire gea</text:p>
          </table:table-cell>
          <table:table-cell office:value-type="float" office:value="0" table:style-name="ce27">
            <text:p>0.00</text:p>
          </table:table-cell>
          <table:table-cell office:value-type="float" office:value="10946873" table:style-name="ce27">
            <text:p>10,946,873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0654.477358490567" table:formula="of:=[.B28]+IF([.D28]=0;0;[.C28]/[.D28])" table:style-name="ce27">
            <text:p>20,654.4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wire q debo a leandro</text:p>
          </table:table-cell>
          <table:table-cell office:value-type="float" office:value="0" table:style-name="ce27">
            <text:p>0.00</text:p>
          </table:table-cell>
          <table:table-cell office:value-type="float" office:value="-4929000" table:style-name="ce27">
            <text:p>-4,929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9300" table:formula="of:=[.B29]+IF([.D29]=0;0;[.C29]/[.D29])" table:style-name="ce27">
            <text:p>-9,30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igue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30]+IF([.D30]=0;0;[.C30]/[.D30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eo Gamboa</text:p>
          </table:table-cell>
          <table:table-cell office:value-type="float" office:value="0" table:style-name="ce27">
            <text:p>0.00</text:p>
          </table:table-cell>
          <table:table-cell office:value-type="float" office:value="3411400" table:style-name="ce27">
            <text:p>3,411,4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6436.6037735849059" table:formula="of:=[.B31]+IF([.D31]=0;0;[.C31]/[.D31])" table:style-name="ce27">
            <text:p>6,436.6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Dova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32]+IF([.D32]=0;0;[.C32]/[.D32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ailed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33]+IF([.D33]=0;0;[.C33]/[.D33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deuda luisi</text:p>
          </table:table-cell>
          <table:table-cell office:value-type="float" office:value="-9000" table:style-name="ce27">
            <text:p>-9,00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9000" table:formula="of:=[.B34]+IF([.D34]=0;0;[.C34]/[.D34])" table:style-name="ce27">
            <text:p>-9,00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Ernesto Wire</text:p>
          </table:table-cell>
          <table:table-cell office:value-type="float" office:value="-50" table:style-name="ce27">
            <text:p>-5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50" table:formula="of:=[.B35]+IF([.D35]=0;0;[.C35]/[.D35])" table:style-name="ce27">
            <text:p>-5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Joge</text:p>
          </table:table-cell>
          <table:table-cell office:value-type="float" office:value="0" table:style-name="ce27">
            <text:p>0.00</text:p>
          </table:table-cell>
          <table:table-cell office:value-type="float" office:value="-444500" table:style-name="ce27">
            <text:p>-444,5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838.67924528301887" table:formula="of:=[.B36]+IF([.D36]=0;0;[.C36]/[.D36])" table:style-name="ce27">
            <text:p>-838.68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Bryan</text:p>
          </table:table-cell>
          <table:table-cell office:value-type="float" office:value="2568.6" table:style-name="ce27">
            <text:p>2,568.60</text:p>
          </table:table-cell>
          <table:table-cell office:value-type="float" office:value="-3856320" table:style-name="ce27">
            <text:p>-3,856,32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4707.4754716981133" table:formula="of:=[.B37]+IF([.D37]=0;0;[.C37]/[.D37])" table:style-name="ce27">
            <text:p>-4,707.48</text:p>
          </table:table-cell>
          <table:table-cell table:style-name="ce6"/>
          <table:table-cell table:number-columns-repeated="4" table:style-name="ce3"/>
          <table:table-cell table:style-name="ce8"/>
          <table:table-cell table:number-columns-repeated="16373"/>
        </table:table-row>
        <table:table-row table:style-name="ro1">
          <table:table-cell office:value-type="string" table:style-name="ce6">
            <text:p>Mory</text:p>
          </table:table-cell>
          <table:table-cell office:value-type="float" office:value="0" table:style-name="ce27">
            <text:p>0.00</text:p>
          </table:table-cell>
          <table:table-cell office:value-type="float" office:value="-846300" table:style-name="ce27">
            <text:p>-846,3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1596.7924528301887" table:formula="of:=[.B38]+IF([.D38]=0;0;[.C38]/[.D38])" table:style-name="ce27">
            <text:p>-1,596.79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6">
            <text:p>Tedio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39]+IF([.D39]=0;0;[.C39]/[.D39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bryan cis</text:p>
          </table:table-cell>
          <table:table-cell office:value-type="float" office:value="0" table:style-name="ce27">
            <text:p>0.00</text:p>
          </table:table-cell>
          <table:table-cell office:value-type="float" office:value="-2125100" table:style-name="ce27">
            <text:p>-2,125,1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4009.6226415094338" table:formula="of:=[.B40]+IF([.D40]=0;0;[.C40]/[.D40])" table:style-name="ce27">
            <text:p>-4,009.62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Carlos LTU</text:p>
          </table:table-cell>
          <table:table-cell office:value-type="float" office:value="0" table:style-name="ce27">
            <text:p>0.00</text:p>
          </table:table-cell>
          <table:table-cell office:value-type="float" office:value="466070" table:style-name="ce27">
            <text:p>466,07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879.37735849056605" table:formula="of:=[.B41]+IF([.D41]=0;0;[.C41]/[.D41])" table:style-name="ce27">
            <text:p>879.38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Pepe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42]+IF([.D42]=0;0;[.C42]/[.D42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Chris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43]+IF([.D43]=0;0;[.C43]/[.D43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table:style-name="ce6"/>
          <table:table-cell office:value-type="float" office:value="0" table:style-name="ce27">
            <text:p>0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44]+IF([.D44]=0;0;[.C44]/[.D44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Rafael</text:p>
          </table:table-cell>
          <table:table-cell office:value-type="float" office:value="0" table:style-name="ce27">
            <text:p>0.00</text:p>
          </table:table-cell>
          <table:table-cell office:value-type="float" office:value="1175585" table:style-name="ce27">
            <text:p>1,175,585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218.0849056603774" table:formula="of:=[.B45]+IF([.D45]=0;0;[.C45]/[.D45])" table:style-name="ce27">
            <text:p>2,218.08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Otros clientes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46]+IF([.D46]=0;0;[.C46]/[.D46])" table:style-name="ce27">
            <text:p>0.00</text:p>
          </table:table-cell>
          <table:table-cell table:style-name="ce9"/>
          <table:table-cell table:number-columns-repeated="16378" table:style-name="ce3"/>
        </table:table-row>
        <table:table-row table:style-name="ro1">
          <table:table-cell office:value-type="string" table:style-name="ce6">
            <text:p>Carllitos Jardin</text:p>
          </table:table-cell>
          <table:table-cell office:value-type="float" office:value="2672" table:style-name="ce27">
            <text:p>2,672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672" table:formula="of:=[.B47]+IF([.D47]=0;0;[.C47]/[.D47])" table:style-name="ce27">
            <text:p>2,672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Carlitos grupo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48]+IF([.D48]=0;0;[.C48]/[.D48])" table:style-name="ce27">
            <text:p>0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Yohan</text:p>
          </table:table-cell>
          <table:table-cell table:style-name="ce27"/>
          <table:table-cell office:value-type="float" office:value="-537600" table:style-name="ce27">
            <text:p>-537,6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1014.3396226415094" table:formula="of:=[.B49]+IF([.D49]=0;0;[.C49]/[.D49])" table:style-name="ce27">
            <text:p>-1,014.3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yohan 2</text:p>
          </table:table-cell>
          <table:table-cell office:value-type="float" office:value="0" table:style-name="ce27">
            <text:p>0.00</text:p>
          </table:table-cell>
          <table:table-cell office:value-type="float" office:value="250000" table:style-name="ce27">
            <text:p>250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471.69811320754718" table:formula="of:=[.B50]+IF([.D50]=0;0;[.C50]/[.D50])" table:style-name="ce27">
            <text:p>471.7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ichel</text:p>
          </table:table-cell>
          <table:table-cell office:value-type="float" office:value="0" table:style-name="ce27">
            <text:p>0.00</text:p>
          </table:table-cell>
          <table:table-cell office:value-type="float" office:value="654749" table:style-name="ce27">
            <text:p>654,749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1235.3754716981132" table:formula="of:=[.B51]+IF([.D51]=0;0;[.C51]/[.D51])" table:style-name="ce27">
            <text:p>1,235.3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Dovakin</text:p>
          </table:table-cell>
          <table:table-cell table:style-name="ce27"/>
          <table:table-cell office:value-type="float" office:value="100000" table:style-name="ce27">
            <text:p>100,0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188.67924528301887" table:formula="of:=[.B52]+IF([.D52]=0;0;[.C52]/[.D52])" table:style-name="ce27">
            <text:p>188.6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arlos Palomino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53]+IF([.D53]=0;0;[.C53]/[.D53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Kevin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54]+IF([.D54]=0;0;[.C54]/[.D54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reiny</text:p>
          </table:table-cell>
          <table:table-cell office:value-type="float" office:value="0" table:style-name="ce27">
            <text:p>0.00</text:p>
          </table:table-cell>
          <table:table-cell office:value-type="float" office:value="248850" table:style-name="ce27">
            <text:p>248,85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469.52830188679246" table:formula="of:=[.B55]+IF([.D55]=0;0;[.C55]/[.D55])" table:style-name="ce27">
            <text:p>469.53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Yasmani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56]+IF([.D56]=0;0;[.C56]/[.D56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Gastos cuentas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57]+IF([.D57]=0;0;[.C57]/[.D57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Adrian</text:p>
          </table:table-cell>
          <table:table-cell office:value-type="float" office:value="4000" table:style-name="ce27">
            <text:p>4,00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4000" table:formula="of:=[.B58]+IF([.D58]=0;0;[.C58]/[.D58])" table:style-name="ce27">
            <text:p>4,00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Edisel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59]+IF([.D59]=0;0;[.C59]/[.D59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Raul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60]+IF([.D60]=0;0;[.C60]/[.D60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Keyni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61]+IF([.D61]=0;0;[.C61]/[.D61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erwin</text:p>
          </table:table-cell>
          <table:table-cell office:value-type="float" office:value="22" table:style-name="ce27">
            <text:p>22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2" table:formula="of:=[.B62]+IF([.D62]=0;0;[.C62]/[.D62])" table:style-name="ce27">
            <text:p>22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Daniela</text:p>
          </table:table-cell>
          <table:table-cell office:value-type="float" office:value="0" table:style-name="ce27">
            <text:p>0.00</text:p>
          </table:table-cell>
          <table:table-cell office:value-type="float" office:value="810710" table:style-name="ce27">
            <text:p>810,71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1529.6415094339623" table:formula="of:=[.B63]+IF([.D63]=0;0;[.C63]/[.D63])" table:style-name="ce27">
            <text:p>1,529.6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bni</text:p>
          </table:table-cell>
          <table:table-cell office:value-type="float" office:value="-200" table:style-name="ce27">
            <text:p>-20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200" table:formula="of:=[.B64]+IF([.D64]=0;0;[.C64]/[.D64])" table:style-name="ce27">
            <text:p>-20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Erlys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65]+IF([.D65]=0;0;[.C65]/[.D65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Fredy</text:p>
          </table:table-cell>
          <table:table-cell office:value-type="float" office:value="0" table:style-name="ce27">
            <text:p>0.00</text:p>
          </table:table-cell>
          <table:table-cell office:value-type="float" office:value="-1433686" table:style-name="ce27">
            <text:p>-1,433,686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2705.0679245283018" table:formula="of:=[.B66]+IF([.D66]=0;0;[.C66]/[.D66])" table:style-name="ce27">
            <text:p>-2,705.0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rene</text:p>
          </table:table-cell>
          <table:table-cell office:value-type="float" office:value="0" table:style-name="ce27">
            <text:p>0.00</text:p>
          </table:table-cell>
          <table:table-cell office:value-type="float" office:value="15170810" table:style-name="ce27">
            <text:p>15,170,81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8624.169811320753" table:formula="of:=[.B67]+IF([.D67]=0;0;[.C67]/[.D67])" table:style-name="ce27">
            <text:p>28,624.1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rene wire</text:p>
          </table:table-cell>
          <table:table-cell office:value-type="float" office:value="0" table:style-name="ce27">
            <text:p>0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68]+IF([.D68]=0;0;[.C68]/[.D68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Gastos personale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69]+IF([.D69]=0;0;[.C69]/[.D69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eandro</text:p>
          </table:table-cell>
          <table:table-cell office:value-type="float" office:value="0" table:style-name="ce27">
            <text:p>0.00</text:p>
          </table:table-cell>
          <table:table-cell office:value-type="float" office:value="-2044500" table:style-name="ce27">
            <text:p>-2,044,50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3857.5471698113206" table:formula="of:=[.B70]+IF([.D70]=0;0;[.C70]/[.D70])" table:style-name="ce27">
            <text:p>-3,857.55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Yendier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71]+IF([.D71]=0;0;[.C71]/[.D71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Ernesto Wire</text:p>
          </table:table-cell>
          <table:table-cell office:value-type="float" office:value="-20000" table:style-name="ce27">
            <text:p>-20,00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-20000" table:formula="of:=[.B72]+IF([.D72]=0;0;[.C72]/[.D72])" table:style-name="ce27">
            <text:p>-20,00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Yandy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73]+IF([.D73]=0;0;[.C73]/[.D73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Por restar</text:p>
          </table:table-cell>
          <table:table-cell office:value-type="float" office:value="-4000" table:style-name="ce27">
            <text:p>-4,000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-4000" table:formula="of:=[.B74]+IF([.D74]=0;0;[.C74]/[.D74])" table:style-name="ce27">
            <text:p>-4,000.00</text:p>
          </table:table-cell>
          <table:table-cell office:value-type="string" table:style-name="ce6">
            <text:p>GMAIL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Yandy</text:p>
          </table:table-cell>
          <table:table-cell table:style-name="ce27"/>
          <table:table-cell office:value-type="float" office:value="18432567" table:style-name="ce27">
            <text:p>18,432,567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34778.428301886794" table:formula="of:=[.B75]+IF([.D75]=0;0;[.C75]/[.D75])" table:style-name="ce27">
            <text:p>34,778.43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uis M</text:p>
          </table:table-cell>
          <table:table-cell office:value-type="float" office:value="3902" table:style-name="ce27">
            <text:p>3,902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3902" table:formula="of:=[.B76]+IF([.D76]=0;0;[.C76]/[.D76])" table:style-name="ce27">
            <text:p>3,902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Alpachino</text:p>
          </table:table-cell>
          <table:table-cell office:value-type="float" office:value="31612.7" table:style-name="ce27">
            <text:p>31,612.7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31612.7" table:formula="of:=[.B77]+IF([.D77]=0;0;[.C77]/[.D77])" table:style-name="ce27">
            <text:p>31,612.7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Wire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0" table:formula="of:=[.B78]+IF([.D78]=0;0;[.C78]/[.D78])" table:style-name="ce27">
            <text:p>0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WF Geisy</text:p>
          </table:table-cell>
          <table:table-cell office:value-type="float" office:value="2246.8000000000002" table:style-name="ce27">
            <text:p>2,246.8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246.8000000000002" table:formula="of:=[.B79]+IF([.D79]=0;0;[.C79]/[.D79])" table:style-name="ce27">
            <text:p>2,246.8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H Pro travel</text:p>
          </table:table-cell>
          <table:table-cell office:value-type="float" office:value="428" table:style-name="ce27">
            <text:p>428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428" table:formula="of:=[.B80]+IF([.D80]=0;0;[.C80]/[.D80])" table:style-name="ce27">
            <text:p>428.00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H Vigo</text:p>
          </table:table-cell>
          <table:table-cell office:value-type="float" office:value="16767" table:style-name="ce27">
            <text:p>16,767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16767" table:formula="of:=[.B81]+IF([.D81]=0;0;[.C81]/[.D81])" table:style-name="ce27">
            <text:p>16,767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CH Lucy</text:p>
          </table:table-cell>
          <table:table-cell office:value-type="float" office:value="20741" table:style-name="ce27">
            <text:p>20,741.00</text:p>
          </table:table-cell>
          <table:table-cell office:value-type="float" office:value="356475" table:style-name="ce27">
            <text:p>356,475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1413.594339622643" table:formula="of:=[.B82]+IF([.D82]=0;0;[.C82]/[.D82])" table:style-name="ce27">
            <text:p>21,413.59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WF Lucy</text:p>
          </table:table-cell>
          <table:table-cell office:value-type="float" office:value="21259" table:style-name="ce27">
            <text:p>21,259.00</text:p>
          </table:table-cell>
          <table:table-cell office:value-type="float" office:value="0" table:style-name="ce27">
            <text:p>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21259" table:formula="of:=[.B83]+IF([.D83]=0;0;[.C83]/[.D83])" table:style-name="ce27">
            <text:p>21,259.00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CHase 3</text:p>
          </table:table-cell>
          <table:table-cell office:value-type="float" office:value="17907" table:style-name="ce27">
            <text:p>17,907.00</text:p>
          </table:table-cell>
          <table:table-cell office:value-type="float" office:value="-14240" table:style-name="ce27">
            <text:p>-14,240.00</text:p>
          </table:table-cell>
          <table:table-cell office:value-type="float" office:value="530" table:formula="of:=[.$I$1]" table:style-name="ce7">
            <text:p>530.00</text:p>
          </table:table-cell>
          <table:table-cell office:value-type="float" office:value="17880.132075471698" table:formula="of:=[.B84]+IF([.D84]=0;0;[.C84]/[.D84])" table:style-name="ce27">
            <text:p>17,880.13</text:p>
          </table:table-cell>
          <table:table-cell table:style-name="ce6"/>
          <table:table-cell table:number-columns-repeated="16378" table:style-name="ce3"/>
        </table:table-row>
        <table:table-row table:style-name="ro1">
          <table:table-cell office:value-type="string" table:style-name="ce6">
            <text:p>Carro</text:p>
          </table:table-cell>
          <table:table-cell office:value-type="float" office:value="36100" table:style-name="ce27">
            <text:p>36,100.00</text:p>
          </table:table-cell>
          <table:table-cell table:style-name="ce27"/>
          <table:table-cell office:value-type="float" office:value="530" table:formula="of:=[.$I$1]" table:style-name="ce7">
            <text:p>530.00</text:p>
          </table:table-cell>
          <table:table-cell office:value-type="float" office:value="36100" table:formula="of:=[.B85]+IF([.D85]=0;0;[.C85]/[.D85])" table:style-name="ce27">
            <text:p>36,100.0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Romey</text:p>
          </table:table-cell>
          <table:table-cell office:value-type="float" office:value="3500" table:style-name="ce26">
            <text:p>3,500.00</text:p>
          </table:table-cell>
          <table:table-cell office:value-type="float" office:value="0" table:style-name="ce3">
            <text:p>0</text:p>
          </table:table-cell>
          <table:table-cell office:value-type="float" office:value="530" table:formula="of:=[.$I$1]" table:style-name="ce5">
            <text:p>530.00</text:p>
          </table:table-cell>
          <table:table-cell office:value-type="float" office:value="3500" table:formula="of:=[.B86]+IF([.D86]=0;0;[.C86]/[.D86])" table:style-name="ce27">
            <text:p>3,500.00</text:p>
          </table:table-cell>
          <table:table-cell table:number-columns-repeated="16379" table:style-name="ce3"/>
        </table:table-row>
        <table:table-row table:style-name="ro1">
          <table:table-cell table:style-name="ce3"/>
          <table:table-cell table:style-name="ce8"/>
          <table:table-cell table:number-columns-repeated="4" table:style-name="ce3"/>
          <table:table-cell table:style-name="ce8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float" office:value="0" table:style-name="ce3">
            <text:p>0</text:p>
          </table:table-cell>
          <table:table-cell table:number-columns-repeated="16381" table:style-name="ce3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2" table:style-name="ce3"/>
          <table:table-cell table:style-name="ce8"/>
          <table:table-cell table:number-columns-repeated="16381" table:style-name="ce3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5" table:style-name="ce3"/>
          <table:table-cell table:style-name="ce8"/>
          <table:table-cell table:number-columns-repeated="2" table:style-name="ce3"/>
          <table:table-cell table:style-name="ce8"/>
          <table:table-cell table:number-columns-repeated="16375"/>
        </table:table-row>
        <table:table-row table:number-rows-repeated="7" table:style-name="ro2">
          <table:table-cell table:number-columns-repeated="16384"/>
        </table:table-row>
        <table:table-row table:style-name="ro3">
          <table:table-cell office:value-type="string" table:style-name="ce12">
            <text:p>TOTALES</text:p>
          </table:table-cell>
          <table:table-cell office:value-type="float" office:value="127724.6" table:formula="of:=SUM([.B2:.B108])" table:style-name="ce7">
            <text:p>127,724.60</text:p>
          </table:table-cell>
          <table:table-cell office:value-type="float" office:value="38474348" table:formula="of:=SUM([.C2:.C108])" table:style-name="ce7">
            <text:p>38,474,348.00</text:p>
          </table:table-cell>
          <table:table-cell office:value-type="string" table:style-name="ce6">
            <text:p>—</text:p>
          </table:table-cell>
          <table:table-cell office:value-type="float" office:value="200317.70943396224" table:formula="of:=SUM([.E2:.E108])" table:style-name="ce7">
            <text:p>200,317.71</text:p>
          </table:table-cell>
          <table:table-cell table:number-columns-repeated="16379" table:style-name="ce3"/>
        </table:table-row>
        <table:table-row table:number-rows-repeated="1048467" table:style-name="ro2">
          <table:table-cell table:number-columns-repeated="16384"/>
        </table:table-row>
      </table:table>
      <table:table table:name="Historico" table:style-name="ta1">
        <table:table-column table:style-name="co6" table:default-cell-style-name="ce3"/>
        <table:table-column table:style-name="co7" table:default-cell-style-name="ce21"/>
        <table:table-column table:style-name="co6" table:number-columns-repeated="5" table:default-cell-style-name="ce3"/>
        <table:table-column table:style-name="co5" table:number-columns-repeated="16377" table:default-cell-style-name="ce1"/>
        <table:table-row table:style-name="ro1">
          <table:table-cell office:value-type="string" table:style-name="ce2">
            <text:p>Fecha</text:p>
          </table:table-cell>
          <table:table-cell office:value-type="string" table:style-name="ce13">
            <text:p>Capital Neto USD</text:p>
          </table:table-cell>
          <table:table-cell office:value-type="string" table:style-name="ce2">
            <text:p>Total Haber USD</text:p>
          </table:table-cell>
          <table:table-cell office:value-type="string" table:style-name="ce2">
            <text:p>Total Debo USD</text:p>
          </table:table-cell>
          <table:table-cell office:value-type="string" table:style-name="ce2">
            <text:p>Notas</text:p>
          </table:table-cell>
          <table:table-cell office:value-type="string" table:style-name="ce2">
            <text:p>USD Equiv.</text:p>
          </table:table-cell>
          <table:table-cell office:value-type="string" table:style-name="ce2">
            <text:p>Nota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-10-2025</text:p>
          </table:table-cell>
          <table:table-cell office:value-type="float" office:value="110831" table:style-name="ce14">
            <text:p><text:s/>$110,831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6">
            <text:p>15-10-2025</text:p>
          </table:table-cell>
          <table:table-cell office:value-type="float" office:value="114055" table:style-name="ce14">
            <text:p><text:s/>$114,055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6">
            <text:p>19-10-2025</text:p>
          </table:table-cell>
          <table:table-cell office:value-type="float" office:value="115837" table:style-name="ce14">
            <text:p><text:s/>$115,837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6">
            <text:p>21-10-2025</text:p>
          </table:table-cell>
          <table:table-cell office:value-type="float" office:value="117451" table:style-name="ce14">
            <text:p><text:s/>$117,451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6">
            <text:p>24-10-2025</text:p>
          </table:table-cell>
          <table:table-cell office:value-type="float" office:value="121717" table:style-name="ce14">
            <text:p><text:s/>$121,717.00<text:s/></text:p>
          </table:table-cell>
          <table:table-cell table:style-name="ce15"/>
          <table:table-cell table:number-columns-repeated="3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6">
            <text:p>4-11-2025</text:p>
          </table:table-cell>
          <table:table-cell office:value-type="float" office:value="112166" table:style-name="ce14">
            <text:p><text:s/>$112,166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16-11-2025</text:p>
          </table:table-cell>
          <table:table-cell office:value-type="float" office:value="112280" table:style-name="ce14">
            <text:p><text:s/>$112,280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26-11-2025</text:p>
          </table:table-cell>
          <table:table-cell office:value-type="float" office:value="120096" table:style-name="ce14">
            <text:p><text:s/>$120,096.00<text:s/></text:p>
          </table:table-cell>
          <table:table-cell table:style-name="ce15"/>
          <table:table-cell table:number-columns-repeated="3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2-12-2025</text:p>
          </table:table-cell>
          <table:table-cell office:value-type="float" office:value="123885" table:style-name="ce14">
            <text:p><text:s/>$123,885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5-12-2025</text:p>
          </table:table-cell>
          <table:table-cell office:value-type="float" office:value="128806" table:style-name="ce14">
            <text:p><text:s/>$128,806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8">
            <text:p>9-12-2025</text:p>
          </table:table-cell>
          <table:table-cell office:value-type="float" office:value="130705" table:style-name="ce19">
            <text:p><text:s/>$130,705.00<text:s/></text:p>
          </table:table-cell>
          <table:table-cell table:number-columns-repeated="3" table:style-name="ce20"/>
          <table:table-cell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8">
            <text:p>16-12-2025</text:p>
          </table:table-cell>
          <table:table-cell office:value-type="float" office:value="138614" table:style-name="ce19">
            <text:p><text:s/>$138,614.00<text:s/></text:p>
          </table:table-cell>
          <table:table-cell table:number-columns-repeated="3" table:style-name="ce20"/>
          <table:table-cell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8">
            <text:p>27-12-2025</text:p>
          </table:table-cell>
          <table:table-cell office:value-type="float" office:value="143830" table:style-name="ce19">
            <text:p><text:s/>$143,830.00<text:s/></text:p>
          </table:table-cell>
          <table:table-cell table:number-columns-repeated="3" table:style-name="ce20"/>
          <table:table-cell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8">
            <text:p>21-1-2026</text:p>
          </table:table-cell>
          <table:table-cell office:value-type="float" office:value="143934" table:style-name="ce19">
            <text:p><text:s/>$143,934.00<text:s/></text:p>
          </table:table-cell>
          <table:table-cell table:number-columns-repeated="3" table:style-name="ce20"/>
          <table:table-cell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2-2-2026</text:p>
          </table:table-cell>
          <table:table-cell office:value-type="float" office:value="147801" table:style-name="ce14">
            <text:p><text:s/>$147,801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22-2-2026</text:p>
          </table:table-cell>
          <table:table-cell office:value-type="float" office:value="166271" table:style-name="ce14">
            <text:p><text:s/>$166,271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4-3-2026</text:p>
          </table:table-cell>
          <table:table-cell office:value-type="float" office:value="179574" table:style-name="ce14">
            <text:p><text:s/>$179,574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office:value-type="string" table:style-name="ce17">
            <text:p>17-3-2026</text:p>
          </table:table-cell>
          <table:table-cell office:value-type="float" office:value="189371" table:style-name="ce14">
            <text:p><text:s/>$189,371.00<text:s/></text:p>
          </table:table-cell>
          <table:table-cell table:number-columns-repeated="4" table:style-name="ce7"/>
          <table:table-cell table:style-name="ce6"/>
          <table:table-cell table:number-columns-repeated="16377"/>
        </table:table-row>
        <table:table-row table:number-rows-repeated="3" table:style-name="ro1">
          <table:table-cell table:style-name="ce17"/>
          <table:table-cell table:style-name="ce14"/>
          <table:table-cell table:number-columns-repeated="4" table:style-name="ce7"/>
          <table:table-cell table:style-name="ce6"/>
          <table:table-cell table:number-columns-repeated="16377"/>
        </table:table-row>
        <table:table-row table:style-name="ro1">
          <table:table-cell table:style-name="ce17"/>
          <table:table-cell table:style-name="ce14"/>
          <table:table-cell table:style-name="ce7"/>
          <table:table-cell table:style-name="ce15"/>
          <table:table-cell table:number-columns-repeated="2" table:style-name="ce7"/>
          <table:table-cell table:style-name="ce6"/>
          <table:table-cell table:number-columns-repeated="16377"/>
        </table:table-row>
        <table:table-row table:number-rows-repeated="8" table:style-name="ro1">
          <table:table-cell table:style-name="ce17"/>
          <table:table-cell table:style-name="ce14"/>
          <table:table-cell table:number-columns-repeated="4" table:style-name="ce7"/>
          <table:table-cell table:style-name="ce6"/>
          <table:table-cell table:number-columns-repeated="16377"/>
        </table:table-row>
        <table:table-row table:number-rows-repeated="43" table:style-name="ro1">
          <table:table-cell table:style-name="ce6"/>
          <table:table-cell table:style-name="ce14"/>
          <table:table-cell table:number-columns-repeated="4" table:style-name="ce7"/>
          <table:table-cell table:style-name="ce6"/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  <table:table table:name="Resumen" table:style-name="ta1">
        <table:table-column table:style-name="co8" table:default-cell-style-name="ce3"/>
        <table:table-column table:style-name="co9" table:default-cell-style-name="ce3"/>
        <table:table-column table:style-name="co5" table:number-columns-repeated="16382" table:default-cell-style-name="ce1"/>
        <table:table-row table:style-name="ro4">
          <table:table-cell office:value-type="string" table:style-name="ce22">
            <text:p>Totales Globales (Actual)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Total a tu favor (USD equiv)</text:p>
          </table:table-cell>
          <table:table-cell office:value-type="float" office:value="302278.86603773589" table:formula="of:=SUMIF([Actual.E2:.E108];&quot;&gt;0&quot;;[Actual.E2:.E108])" table:style-name="ce23">
            <text:p>302,278.87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Total que debes (USD equiv)</text:p>
          </table:table-cell>
          <table:table-cell office:value-type="float" office:value="101961.15660377358" table:formula="of:=ABS(SUMIF([Actual.E2:.E108];&quot;&lt;0&quot;;[Actual.E2:.E108]))" table:style-name="ce24">
            <text:p>101,961.16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Capital neto (USD equiv)</text:p>
          </table:table-cell>
          <table:table-cell office:value-type="float" office:value="200317.7094339623" table:formula="of:=[.B3]-[.B4]" table:style-name="ce25">
            <text:p>200,317.71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  <table:table table:name="Dashboard" table:style-name="ta1">
        <table:table-column table:style-name="co5" table:number-columns-repeated="16384" table:default-cell-style-name="ce3"/>
        <table:table-row table:style-name="ro4">
          <table:table-cell office:value-type="string" table:style-name="ce22">
            <text:p>Evolución del capital neto (USD equivalente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">
            <draw:frame draw:z-index="1" draw:id="id0" draw:style-name="a0" draw:name="Chart 1" svg:x="0in" svg:y="0in" svg:width="5.9047in" svg:height="2.95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/>
          <table:table-cell table:style-name="ce3">
            <draw:frame draw:z-index="2" draw:id="id1" draw:style-name="a1" draw:name="Chart 2" svg:x="0in" svg:y="0in" svg:width="5.9047in" svg:height="2.95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database-ranges>
        <table:database-range table:target-range-address="Actual.A1:Actual.F108" table:name="tblActual" table:display-filter-buttons="true"/>
        <table:database-range table:target-range-address="Historico.A1:Historico.E15" table:name="tblHistorico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P0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6P2">
      <number:text> $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000000"/>
    </style:style>
    <style:style style:name="cf10" style:family="table-cell" style:data-style-name="N0">
      <style:table-cell-properties fo:background-color="#FFC7CE"/>
    </style:style>
    <style:style style:name="cf11" style:family="table-cell" style:data-style-name="N0">
      <style:table-cell-properties fo:background-color="#FFF2CC"/>
    </style:style>
    <style:style style:name="cf12" style:family="table-cell" style:data-style-name="N0">
      <style:table-cell-properties fo:background-color="#C6EFCE"/>
    </style:style>
    <style:style style:name="cf13" style:family="table-cell" style:data-style-name="N0">
      <style:table-cell-properties fo:background-color="#FFC7CE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C6EFCE"/>
    </style:style>
    <style:style style:name="cf16" style:family="table-cell" style:data-style-name="N0">
      <style:table-cell-properties fo:background-color="#FFC7CE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C6EFCE"/>
    </style:style>
    <style:style style:name="cf19" style:family="table-cell" style:data-style-name="N0">
      <style:table-cell-properties fo:background-color="#FFC7CE"/>
    </style:style>
    <style:style style:name="cf2" style:family="table-cell" style:data-style-name="N0">
      <style:table-cell-properties fo:background-color="#FFF2CC"/>
      <style:text-properties fo:color="#000000"/>
    </style:style>
    <style:style style:name="cf20" style:family="table-cell" style:data-style-name="N0">
      <style:table-cell-properties fo:background-color="#FFF2CC"/>
    </style:style>
    <style:style style:name="cf21" style:family="table-cell" style:data-style-name="N0">
      <style:table-cell-properties fo:background-color="#C6EFCE"/>
    </style:style>
    <style:style style:name="cf22" style:family="table-cell" style:data-style-name="N0">
      <style:table-cell-properties fo:background-color="#FFC7CE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C6EFCE"/>
    </style:style>
    <style:style style:name="cf25" style:family="table-cell" style:data-style-name="N0">
      <style:table-cell-properties fo:background-color="#FFC7CE"/>
    </style:style>
    <style:style style:name="cf26" style:family="table-cell" style:data-style-name="N0">
      <style:table-cell-properties fo:background-color="#FFF2CC"/>
    </style:style>
    <style:style style:name="cf27" style:family="table-cell" style:data-style-name="N0">
      <style:table-cell-properties fo:background-color="#C6EFCE"/>
    </style:style>
    <style:style style:name="cf28" style:family="table-cell" style:data-style-name="N0">
      <style:table-cell-properties fo:background-color="#FFC7CE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C6EFCE"/>
      <style:text-properties fo:color="#000000"/>
    </style:style>
    <style:style style:name="cf30" style:family="table-cell" style:data-style-name="N0">
      <style:table-cell-properties fo:background-color="#C6EFCE"/>
    </style:style>
    <style:style style:name="cf31" style:family="table-cell" style:data-style-name="N0">
      <style:table-cell-properties fo:background-color="#FFC7CE"/>
    </style:style>
    <style:style style:name="cf32" style:family="table-cell" style:data-style-name="N0">
      <style:table-cell-properties fo:background-color="#FFF2CC"/>
    </style:style>
    <style:style style:name="cf33" style:family="table-cell" style:data-style-name="N0">
      <style:table-cell-properties fo:background-color="#C6EFCE"/>
    </style:style>
    <style:style style:name="cf4" style:family="table-cell" style:data-style-name="N0">
      <style:table-cell-properties fo:background-color="#FFC7CE"/>
    </style:style>
    <style:style style:name="cf5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C6EFCE"/>
    </style:style>
    <style:style style:name="cf7" style:family="table-cell" style:data-style-name="N0">
      <style:table-cell-properties fo:background-color="#FFC7CE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C6EFCE"/>
    </style:style>
    <style:style style:name="ConditionalStyle_10" style:family="table-cell" style:data-style-name="N0">
      <style:table-cell-properties style:vertical-align="automatic" fo:background-color="#FFF2CC"/>
      <style:text-properties fo:color="#000000"/>
    </style:style>
    <style:style style:name="ConditionalStyle_8" style:family="table-cell" style:data-style-name="N0">
      <style:table-cell-properties style:vertical-align="automatic" fo:background-color="#C6EFCE"/>
      <style:text-properties fo:color="#000000"/>
    </style:style>
    <style:style style:name="ConditionalStyle_9" style:family="table-cell" style:data-style-name="N0">
      <style:table-cell-properties style:vertical-align="automatic" fo:background-color="#FFC7CE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urrency" style:display-name="Excel Built-in Currency" style:family="table-cell" style:data-style-name="N36">
      <style:table-cell-properties style:vertical-align="automatic" fo:background-color="transparent"/>
      <style:text-properties fo:color="#00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fo:color="#000000"/>
    </style:style>
    <style:style style:name="Text" style:family="table-cell" style:data-style-name="N0">
      <style:table-cell-properties style:vertical-align="automatic"/>
      <style:text-properties fo:color="#000000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cf34" style:family="table-cell">
      <style:table-cell-properties fo:background-color="#FFC7CE"/>
      <style:text-properties fo:color="#000000" style:font-family-generic="swiss"/>
    </style:style>
    <style:style style:name="cf35" style:family="table-cell">
      <style:table-cell-properties fo:background-color="#FFF2CC"/>
      <style:text-properties fo:color="#000000" style:font-family-generic="swiss"/>
    </style:style>
    <style:style style:name="cf36" style:family="table-cell">
      <style:table-cell-properties fo:background-color="#C6EFCE"/>
      <style:text-properties fo:color="#000000" style:font-family-generic="swiss"/>
    </style: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2</meta:generator>
    <dc:title/>
    <dc:description/>
    <dc:subject/>
    <meta:initial-creator>openpyxl</meta:initial-creator>
    <dc:creator>jose gabriel</dc:creator>
    <meta:creation-date>2025-09-26T03:38:13Z</meta:creation-date>
    <dc:date>2026-04-11T08:31:54Z</dc:date>
    <meta:editing-cycles>3</meta:editing-cycles>
    <meta:user-defined meta:name="AppVersion">15.00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6P0">
      <number:text> $</number:text>
    </number:text-style>
    <number:text-style style:name="N36P1">
      <number:text> $</number:text>
    </number:text-style>
    <number:text-style style:name="N36P2">
      <number:text> $</number:text>
    </number:text-style>
    <number:text-style style:name="N36"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78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12.543937007874pt" svg:width="425.1383464566929pt" chart:style-name="Crt0">
        <chart:title chart:style-name="CT00">
          <text:p text:style-name="a0" text:class-names="" text:cond-style-name="">Capital Neto por Dí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apital Neto (USD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echa</text:p>
            </chart:title>
            <chart:categories table:cell-range-address="Historico.A2:.A15"/>
          </chart:axis>
          <chart:series chart:label-cell-address="Historico.B1" chart:values-cell-range-address="Historico.B2:.B15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12.543937007874pt" svg:width="425.1383464566929pt" chart:style-name="Crt0">
        <chart:title chart:style-name="CT00">
          <text:p text:style-name="a0" text:class-names="" text:cond-style-name="">Total a tu favor vs Total que deb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USD equivalente</text:p>
            </chart:title>
            <chart:grid chart:class="major" chart:style-name="GMa0"/>
          </chart:axis>
          <chart:axis chart:dimension="x" chart:name="primary-x" chart:style-name="Axs1">
            <chart:categories table:cell-range-address="Resumen.A3:.A4"/>
          </chart:axis>
          <chart:series chart:values-cell-range-address="Resumen.B3:.B4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